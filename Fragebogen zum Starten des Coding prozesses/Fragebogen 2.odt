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style="italic" officeooo:rsid="00191d40" officeooo:paragraph-rsid="00191d40" style:font-style-asian="italic" style:font-style-complex="italic"/>
    </style:style>
    <style:style style:name="P2" style:family="paragraph" style:parent-style-name="Text_20_body">
      <style:text-properties fo:font-style="italic" officeooo:rsid="001b04c4" officeooo:paragraph-rsid="001b04c4" style:font-style-asian="italic" style:font-style-complex="italic"/>
    </style:style>
    <style:style style:name="P3" style:family="paragraph" style:parent-style-name="Text_20_body">
      <style:text-properties fo:font-style="italic" officeooo:paragraph-rsid="001b04c4" style:font-style-asian="italic" style:font-style-complex="italic"/>
    </style:style>
    <style:style style:name="P4" style:family="paragraph" style:parent-style-name="Text_20_body">
      <style:text-properties officeooo:rsid="001b04c4" officeooo:paragraph-rsid="001b04c4"/>
    </style:style>
    <style:style style:name="T1" style:family="text">
      <style:text-properties officeooo:rsid="001b04c4"/>
    </style:style>
    <style:style style:name="T2" style:family="text">
      <style:text-properties officeooo:rsid="001c3c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Fragebogen 2 – verbleibende offene Punkte</text:h>
      <text:p text:style-name="Text_20_body"><text:span text:style-name="Strong_20_Emphasis">I. Förder-Datenquelle (Rest)</text:span> 4. Wie viele Förderungen umfasst das Startset realistisch? (5 / 20 / 50+) 5. Geografischer Fokus? (nur Schweiz / CH + EU / international) 6. Existiert bereits eine eigene Liste/Tabelle bekannter Förderungen als Startbestand?</text:p>
      <text:p text:style-name="P1">Das Startset wird wahrscheinlich ca. 20 bis 30 Förderungen enthalten. Es existiert bereits eine Liste , die als erste Grundlage verwendet werden kann. Geografisch verortet es sich in der DACH region, bezieht aber internationale Förderungen mit ein, die für Projekte in der Region in Anspruch genommen werden können.</text:p>
      <text:p text:style-name="Text_20_body"><text:span text:style-name="Strong_20_Emphasis">J. Nutzer &amp; Rollen</text:span> 7. Haben alle 1–5 Personen dieselben Rechte, oder gibt es Rollen (z. B. „darf Förderungen pflegen" vs. „darf nur Anträge ausfüllen")? 8. Ist ein Login/Passwortschutz nötig, oder ist das Gerät selbst bereits ausreichend geschützt?</text:p>
      <text:p text:style-name="P1">Zum jetzigen Zeitpunkt haben alle die selben Rechte zu einem Späteren Zeitpunkt würde das als Funktion vielleicht dazukommen. Ausserdem soll es vielleicht zu einem späteren Zeitpunkt ein Abo Modell implementiert werden umd die laufenden kosten zu decken. Dafür bräuchte es eine art von Verifizierung. Zum jetzigen Zeitpunkt spieltz das aber noch keine Rolle.</text:p>
      <text:p text:style-name="Text_20_body"><text:span text:style-name="Strong_20_Emphasis">K. Matching-Logik (die „Suchmaschine")</text:span> 9. Nach welchen Kriterien soll der Eingangs-Fragebogen filtern? (z. B. Sparte, Projektart, Region, Budgetgrösse, Trägerschaft, Zeitpunkt) – die wichtigsten 5–8 nennen. 10. Soll das Ergebnis eine harte Filterung sein („nur exakt passende") oder eine Rangliste nach Passgenauigkeit?</text:p>
      <text:p text:style-name="P1">Sparte</text:p>
      <text:p text:style-name="P1">Projektart</text:p>
      <text:p text:style-name="P1">Budgetgrösse</text:p>
      <text:p text:style-name="P1">Trägerschaft (auch frage ob studentisch oder nicht)</text:p>
      <text:p text:style-name="P1">Zeitpunkt des Projekts</text:p>
      <text:p text:style-name="P1">Durchführungsort des Projekts</text:p>
      <text:p text:style-name="P1">Wohnsitz der Antrag stellenden Person (ist für manche Förderungen ein Kriterium)</text:p>
      <text:p text:style-name="P1">(Hinweise, wenn sich Förderungen gegenseitig ausschliessen)</text:p>
      <text:p text:style-name="P1">Soll eine Ra<text:span text:style-name="T1">n</text:span>gliste sein. Die nicht prassenden sollen unter weitere Vorschläge aufgelistet sein, mit einem Hinweis was nicht passt.</text:p>
      <text:p text:style-name="P2">Die Filteroptionen werden wohl zu einem Späteren Zeitpunkt angepasst werden müssen.</text:p>
      <text:p text:style-name="Text_20_body"><text:span text:style-name="Strong_20_Emphasis">L. Stammdaten &amp; Formular-Wiederverwendung</text:span> 11. Welche Angaben werden voraussichtlich am häufigsten mehrfach gebraucht? (grobe Liste – z. B. Name, Adresse, IBAN, Projektbeschrieb, Budget) 12. In welchen Formaten liegen die Anträge vor? (PDF-Formulare / Word / reine Web-Portale / Freitext-Briefe) – Mehrfachnennung möglich. 13. Soll das fertige „Antragsfile" ein ausgefülltes PDF, ein Word-Dokument oder ein strukturierter Text zum Kopieren sein?</text:p>
      <text:p text:style-name="P3"><text:span text:style-name="T1">Projekttitel, Zeitpunkt des Projekts, </text:span>Name, Adresse, IBAN, Projektbeschrieb, Budget <text:span text:style-name="T1">sind voraussichtlich die häufigsten.</text:span></text:p>
      <text:p text:style-name="P2"><text:soft-page-break/>Das Fertige Antragsfile soll eine Word Datei sein, damit es noch angepasst werden kann wenn nötig. Dieses wird dann in ein PDF von den Teams konvertiert werden, unabhängig vom Programm.</text:p>
      <text:p text:style-name="Text_20_body"><text:span text:style-name="Strong_20_Emphasis">M. Status &amp; Workflow</text:span> 14. Sollen die in FB1 genannten Status-Ketten (Antrag / Checkliste) frei anpassbar sein oder fest vorgegeben? 15. Sollen Status-Änderungen protokolliert werden (Verlauf/Historie) oder nur der aktuelle Stand sichtbar sein?</text:p>
      <text:p text:style-name="Text_20_body"/>
      <text:p text:style-name="P2">Die Auswahl der Status anzeigen sind fest vorgegeben, mit einem Status, der «ich habe einen Anderen Status» heisst und und frei beschriftet werden kann.</text:p>
      <text:p text:style-name="Text_20_body"/>
      <text:p text:style-name="P4">Beim Status muss nur der aktuelle <text:span text:style-name="T2">S</text:span>tand sichtbar sein.</text:p>
      <text:p text:style-name="Text_20_body"><text:span text:style-name="Strong_20_Emphasis">N. Kalender</text:span> 16. Reicht eine reine Listen-/Monatsansicht, oder soll der Kalender mit bestehenden Kalendern synchronisieren? (Sync würde den Lokal-only-Grundsatz erneut berühren.) 17. Sollen vor Deadlines Erinnerungen ausgelöst werden? Falls ja: wie (Anzeige in der App / E-Mail / System-Benachrichtigung)?</text:p>
      <text:p text:style-name="P4">Die Anwendung hat einen eigenen Kalender, der bei den Mitarbeitern des Projekts synchronisiert. Mitteilungen in der App soll beim eintragen der Deadline aktiviert werden könne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2T13:29:44.319901900</meta:creation-date>
    <dc:date>2026-06-12T13:51:36.572115100</dc:date>
    <meta:editing-duration>PT23S</meta:editing-duration>
    <meta:editing-cycles>1</meta:editing-cycles>
    <meta:document-statistic meta:table-count="0" meta:image-count="0" meta:object-count="0" meta:page-count="2" meta:paragraph-count="24" meta:word-count="516" meta:character-count="3695" meta:non-whitespace-character-count="3201"/>
    <meta:generator>LibreOffice/26.2.4.2$Windows_X86_64 LibreOffice_project/0229ac93fcf0d7cbc6376066c6f35021cef002dc</meta:generator>
  </office:meta>
</office:document-meta>
</file>