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tyle="italic" officeooo:rsid="000a0459" officeooo:paragraph-rsid="000a0459" style:font-style-asian="italic" style:font-style-complex="italic"/>
    </style:style>
    <style:style style:name="P3" style:family="paragraph" style:parent-style-name="Text_20_body">
      <style:text-properties fo:font-style="italic" officeooo:rsid="000bd495" officeooo:paragraph-rsid="000bd495" style:font-style-asian="italic" style:font-style-complex="italic"/>
    </style:style>
    <style:style style:name="P4" style:family="paragraph" style:parent-style-name="Text_20_body">
      <style:text-properties fo:font-style="italic" officeooo:rsid="000a0459" officeooo:paragraph-rsid="000a0459" style:font-style-asian="italic" style:font-style-complex="italic"/>
    </style:style>
    <style:style style:name="P5" style:family="paragraph" style:parent-style-name="Text_20_body">
      <style:text-properties officeooo:rsid="000bd495" officeooo:paragraph-rsid="000bd495"/>
    </style:style>
    <style:style style:name="P6" style:family="paragraph" style:parent-style-name="Text_20_body">
      <style:text-properties officeooo:paragraph-rsid="000bd495"/>
    </style:style>
    <style:style style:name="P7" style:family="paragraph" style:parent-style-name="Text_20_body">
      <style:text-properties officeooo:paragraph-rsid="000d7738"/>
    </style:style>
    <style:style style:name="P8" style:family="paragraph" style:parent-style-name="Standard">
      <style:text-properties fo:font-style="italic" officeooo:rsid="000d7738" style:font-style-asian="italic" style:font-style-complex="italic"/>
    </style:style>
    <style:style style:name="T1" style:family="text">
      <style:text-properties fo:font-style="normal" style:font-style-asian="normal" style:font-style-complex="normal"/>
    </style:style>
    <style:style style:name="T2" style:family="text">
      <style:text-properties officeooo:rsid="000bd495"/>
    </style:style>
    <style:style style:name="T3" style:family="text">
      <style:text-properties officeooo:rsid="000d773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ragebogen 3 – Technik, Daten &amp; Architektur</text:h>
      <text:p text:style-name="Text_20_body"><text:span text:style-name="Strong_20_Emphasis">O. Vorgehensstrategie</text:span></text:p>
      <text:list text:style-name="L1">
        <text:list-item>
          <text:p text:style-name="P1">Stufenplan akzeptiert (erst Einzelplatz-MVP mit lokaler Ebene + manueller Förderliste, danach Sync und Halb-Automatik) – ja / nein / anders? </text:p>
          <text:p text:style-name="P2">ja</text:p>
        </text:list-item>
      </text:list>
      <text:p text:style-name="Text_20_body"><text:span text:style-name="Strong_20_Emphasis">P. Geteilte Ebene – Speicherort &amp; Zugang</text:span> 2. Die geteilte Ebene (Förder-DB, Merkliste, Status, Kalender/Deadlines) soll wo liegen – Synology NAS oder externer Server (netcup)? 3. Zugriff des Teams – nur im selben lokalen Netz, per VPN, oder über das offene Internet? 4. Genügt ein gemeinsames Team-Passwort, oder eigene Konten pro Person? (Hinweis: ein späteres Abo-/Verifizierungs-Modell würde eigene Konten erfordern – soll die Architektur das jetzt schon offenhalten?)</text:p>
      <text:p text:style-name="P3">es wird bis auf weiteres auf der NAS gehostet</text:p>
      <text:p text:style-name="P4">Wenn es kein sicherheitsproblem ist (sensible Daten sind ja ausschliesslich lokal) dann einfach über das Internet.</text:p>
      <text:p text:style-name="P4">Die Architektur bereits so bauen dass ein späteres Abo-/Verifizierungs-Modell mit gedacht wird und dann später implementiert werden kann.</text:p>
      <text:p text:style-name="Text_20_body"><text:span text:style-name="Strong_20_Emphasis"><text:span text:style-name="T1">Q. Lokale Ebene – Sicherung &amp; Verschlüs</text:span></text:span><text:span text:style-name="Strong_20_Emphasis">selung</text:span> 5. Lokale Backup-/Export-Funktion für die sensiblen Daten vorsehen (Verlustrisiko bei Gerätedefekt)? – ja / nein 6. Sensible Daten lokal verschlüsselt ablegen (Passwort beim Start)? – ja / nein</text:p>
      <text:p text:style-name="P3">Lokale Backup Funktion einbauen. Man soll auch die eingepflegten Daten von einem vorherigen Antrag wiederverwenden können.</text:p>
      <text:p text:style-name="P3">Lokal verschlüsseln, also mit passwort.</text:p>
      <text:p text:style-name="Text_20_body"><text:span text:style-name="Strong_20_Emphasis">R. Datei-Verarbeitung &amp; Word-Erzeugung</text:span> 7. Word-Antragsfile: pro Förderung eine eigene <text:span text:style-name="Strong_20_Emphasis">Vorlage</text:span> (genaue Nachbildung) oder ein <text:span text:style-name="Strong_20_Emphasis">generisch erzeugtes Sammeldokument</text:span> der geforderten Angaben? (siehe Punkt 3 oben) 8. Aus welchem Ordner liest / in welchen Ordner schreibt das Programm? (z. B. fester Projektordner)</text:p>
      <text:p text:style-name="P3">Pro Förderung wird ein eigenes zugeschnittenes File erzeugt.</text:p>
      <text:p text:style-name="P5">Die Ordnerstruktur ist: [allgemeiner Programmordner]/[Projektname]/[einzelne Förderung]</text:p>
      <text:p text:style-name="P5">im Ordner [Projektname] soll zudem ein file mit den Antworten, sowie drm Projetbeschrieb erstellt/abgelegt werden, dieses wird vom Programm benutzt, kann aber auch vom Team gelesen und Benutzt werden. (Am anfang vom File muss immer der Hinweis stehen, was mit dem File meacht beziehungsweise nicht gemacht werden darf, damit das Programm weiterhin funktioniert.)</text:p>
      <text:p text:style-name="Text_20_body"><text:span text:style-name="Strong_20_Emphasis">S. Förder-Datenmodell (zur Bestätigung/Ergänzung)</text:span> 9. Vorgeschlagene Felder pro Förderung – passt das, fehlt etwas? <text:span text:style-name="Emphasis">Titel, Träger, Sparte, Region/Durchführungsort-Anforderung, Wohnsitz-Anforderung, Trägerschaft (inkl. studentisch ja/nein), Budgetrahmen, Förderhöhe, Voraussetzungen, geforderte Angaben/Dateien, Antragsweg (Word/Web/Brief), Deadline-Typ (fix/rollierend), </text:span><text:span text:style-name="Emphasis"><text:span text:style-name="Strong_20_Emphasis">unverträglich mit (Liste anderer Förderungen)</text:span></text:span><text:span text:style-name="Emphasis">, Link.</text:span></text:p>
      <text:p text:style-name="Text_20_body"><text:span text:style-name="Emphasis"/></text:p>
      <text:p text:style-name="P6"><text:soft-page-break/><text:span text:style-name="Emphasis"><text:span text:style-name="T2">Ja passt für den Moment</text:span></text:span></text:p>
      <text:p text:style-name="P7"><text:span text:style-name="Emphasis"><text:span text:style-name="T3">(als Zusatzfunktion später die Möglichkeit Fehler in der Liste zu melden)</text:span></text:span></text:p>
      <text:p text:style-name="Text_20_body"><text:span text:style-name="Strong_20_Emphasis">T. Halb-automatische Aktualisierung (Ausbaustufe)</text:span> 10. Aktualisierung manuell per Knopfdruck oder automatisch (z. B. wöchentlich)? 11. Sollen vorgeschlagene Änderungen erst zur Freigabe angezeigt werden, bevor sie in die DB übernommen werden? – ja / nein</text:p>
      <text:p text:style-name="P3">ja</text:p>
      <text:p text:style-name="Text_20_body"><text:span text:style-name="Strong_20_Emphasis">U. Technik-Präferenzen</text:span> 12. Tendenz: ein Programm <text:span text:style-name="Emphasis">installieren</text:span> (höhere Lokal-Sicherheit) vs. nur im Browser öffnen (bequemer)? 13. Betriebssystem(e) der nutzenden Geräte? (Windows / macOS / Linux / gemischt)</text:p>
      <text:p text:style-name="P3">Tendenz ein Programm installieren.</text:p>
      <text:p text:style-name="P3">Betriebssystem gemischt, wenn möglich. Sonst zuerst auf Windows und später entwichen von macOS und Linux Versionen.</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2T13:53:48.210948300</meta:creation-date>
    <dc:date>2026-06-12T14:15:48.679166500</dc:date>
    <meta:editing-duration>PT1M11S</meta:editing-duration>
    <meta:editing-cycles>1</meta:editing-cycles>
    <meta:document-statistic meta:table-count="0" meta:image-count="0" meta:object-count="0" meta:page-count="2" meta:paragraph-count="23" meta:word-count="431" meta:character-count="3316" meta:non-whitespace-character-count="2897"/>
    <meta:generator>LibreOffice/26.2.4.2$Windows_X86_64 LibreOffice_project/0229ac93fcf0d7cbc6376066c6f35021cef002dc</meta:generator>
  </office:meta>
</office:document-meta>
</file>