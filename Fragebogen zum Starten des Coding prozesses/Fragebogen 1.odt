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paragraph-properties fo:margin-top="0cm" fo:margin-bottom="0cm" style:contextual-spacing="false"/>
      <style:text-properties fo:font-style="italic" officeooo:rsid="0002241f" officeooo:paragraph-rsid="0002241f" style:font-style-asian="italic" style:font-style-complex="italic"/>
    </style:style>
    <style:style style:name="P3" style:family="paragraph" style:parent-style-name="Text_20_body" style:list-style-name="L1">
      <style:paragraph-properties fo:margin-top="0cm" fo:margin-bottom="0cm" style:contextual-spacing="false"/>
      <style:text-properties fo:font-style="italic" officeooo:rsid="0003bfb7" officeooo:paragraph-rsid="0003bfb7" style:font-style-asian="italic" style:font-style-complex="italic"/>
    </style:style>
    <style:style style:name="P4" style:family="paragraph" style:parent-style-name="Text_20_body" style:list-style-name="L1"/>
    <style:style style:name="P5" style:family="paragraph" style:parent-style-name="Text_20_body" style:list-style-name="L1">
      <style:text-properties fo:font-style="italic" officeooo:rsid="0003bfb7" officeooo:paragraph-rsid="0003bfb7" style:font-style-asian="italic" style:font-style-complex="italic"/>
    </style:style>
    <style:style style:name="P6" style:family="paragraph" style:parent-style-name="Text_20_body">
      <style:text-properties fo:font-style="italic" officeooo:rsid="0003bfb7" officeooo:paragraph-rsid="0003bfb7" style:font-style-asian="italic" style:font-style-complex="italic"/>
    </style:style>
    <style:style style:name="P7" style:family="paragraph" style:parent-style-name="Text_20_body">
      <style:text-properties fo:font-style="italic" officeooo:rsid="00044b7e" officeooo:paragraph-rsid="00044b7e" style:font-style-asian="italic" style:font-style-complex="italic"/>
    </style:style>
    <style:style style:name="P8" style:family="paragraph" style:parent-style-name="Text_20_body">
      <style:text-properties fo:font-style="italic" fo:font-weight="normal" officeooo:rsid="0006b823" officeooo:paragraph-rsid="0006b823" style:font-style-asian="italic" style:font-weight-asian="normal" style:font-style-complex="italic" style:font-weight-complex="normal"/>
    </style:style>
    <style:style style:name="P9" style:family="paragraph" style:parent-style-name="Text_20_body">
      <style:text-properties fo:font-style="italic" fo:font-weight="normal" officeooo:rsid="00044b7e" officeooo:paragraph-rsid="00044b7e" style:font-style-asian="italic" style:font-weight-asian="normal" style:font-style-complex="italic" style:font-weight-complex="normal"/>
    </style:style>
    <style:style style:name="P10" style:family="paragraph" style:parent-style-name="Text_20_body">
      <style:text-properties fo:font-style="italic" officeooo:rsid="0004d12e" officeooo:paragraph-rsid="0004d12e" style:font-style-asian="italic" style:font-style-complex="italic"/>
    </style:style>
    <style:style style:name="P11" style:family="paragraph" style:parent-style-name="Text_20_body">
      <style:text-properties fo:font-style="italic" officeooo:paragraph-rsid="0004d12e" style:font-style-asian="italic" style:font-style-complex="italic"/>
    </style:style>
    <style:style style:name="P12" style:family="paragraph" style:parent-style-name="Text_20_body">
      <style:text-properties officeooo:paragraph-rsid="0006b823"/>
    </style:style>
    <style:style style:name="T1" style:family="text">
      <style:text-properties officeooo:rsid="0003bfb7"/>
    </style:style>
    <style:style style:name="T2" style:family="text">
      <style:text-properties officeooo:rsid="0006b823"/>
    </style:style>
    <style:style style:name="T3" style:family="text">
      <style:text-properties officeooo:rsid="0004d12e"/>
    </style:style>
    <style:style style:name="T4" style:family="text">
      <style:text-properties fo:font-style="normal" style:font-style-asian="normal" style:font-style-complex="normal"/>
    </style:style>
    <style:style style:name="T5" style:family="text">
      <style:text-properties fo:font-style="italic" officeooo:rsid="0006b823" style:font-style-asian="italic" style:font-style-complex="itali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Fragebogen 1 – Vision &amp; Problem</text:h>
      <text:p text:style-name="Text_20_body"><text:span text:style-name="Strong_20_Emphasis">A. Kernidee</text:span></text:p>
      <text:list text:style-name="L1">
        <text:list-item>
          <text:p text:style-name="P1">Was soll die Anwendung in einem Satz tun? (Formel: „Sie ermöglicht [wem], [was] zu tun, ohne [bisherige Hürde].") </text:p>
          <text:p text:style-name="P2">Das Programm Antrag 3000 soll freischaffenden Künstlern und Teams, die ein Festival oder andere Projekte organisieren bei der Beschaffung von Finanzierung durch Drittmittel unterstützen. Durch die Anwendung soll der benötigte Aufwand passende Fördermöglichkeiten und deren Voraussetzungslosen zu recherchieren, reduziert werden. Ausserdem soll das Programm eine Übersichtlichkeit verbessern, in dem die Anforderungen extrahiert und übersichtlich aufgelistet wird und die Erstellung von Anträgen durch Auszufüllende Formulare statt dem eigenhändigen erstellen von zb. Spreadsheets erleichtert werden. Informationen, die von verschiedenen Stellen gefordert werden, sollen nur einmal eingegeben werden müssen und dann in die verschiedenen Anträge kopiert werden können.</text:p>
          <text:p text:style-name="P3">Als weitere Funktion, soll es eine kalenderansicht geben, bei denen die Deadlines der zu stellenden Anträge eingetragen sind, soie eigene Deadlines eingetragen werden können.</text:p>
        </text:list-item>
        <text:list-item>
          <text:p text:style-name="P1">Welches konkrete Problem löst sie? Was passiert aktuell <text:span text:style-name="Emphasis">ohne</text:span> die Anwendung? </text:p>
          <text:p text:style-name="P2">Im <text:span text:style-name="T1">M</text:span>oment <text:span text:style-name="T1">muss, wenn ein Projekt lanciert werden eigenständig im Internet recherchiert werden welche Förderung für das eigene Projekt in Frage kommen. Dann müssen sich die jeweiligen Voraussetzungen und geforderte Anaben und Dateien notiert werden. Anschliessend muss jeder Antrag einzeln zusammengestellt werden. Das Programm soll das alles vereinfachen und Zentralisierter gestalten. Die grossen probleme sind ohne die geplante Lösung: Aufwändiges einzelnes recherchieren. Unübersichtlichkeit von Anforderungen und Deadlines sowie redundanzen in der zu leistenden Arbeit.</text:span></text:p>
        </text:list-item>
        <text:list-item>
          <text:p text:style-name="P4">Gibt es bereits existierende Lösungen/Konkurrenz? Falls ja: Was soll anders/besser sein? </text:p>
          <text:p text:style-name="P5">Bei meiner Recherche habe ich «approvio» (https://approvio.ch/) ich kenne das Programm aber nicht.</text:p>
        </text:list-item>
      </text:list>
      <text:p text:style-name="Text_20_body"><text:span text:style-name="Strong_20_Emphasis">B. Nutzungskontext</text:span> 4. Wer benutzt sie? (z. B. nur du selbst, ein Team, öffentliche Nutzer, Kunden) 5. Wie viele Personen gleichzeitig realistisch? (1 / &lt;10 / &lt;100 / &gt;1000) 6. Wann/wo wird sie benutzt? (täglich am Desktop, mobil unterwegs, sporadisch)</text:p>
      <text:p text:style-name="P6">Die Anwendung soll am Desktop von einem Team von 1 bis 5 Personen benutzt werden.</text:p>
      <text:p text:style-name="Text_20_body"><text:span text:style-name="Strong_20_Emphasis">C. Plattform</text:span> 7. Web-App, Mobile-App, Desktop-Programm oder Kommandozeile? 8. Falls Web: nur Browser-basiert oder muss es offline funktionieren?</text:p>
      <text:p text:style-name="P7">Das Programm muss nicht unbedingt auch offline laufen. Es braucht aber Zugriffsmöglichkeit auf lokale Dateien und sensible informationen sollen nur Lokal auf dem bearbeitenden Gerät abgespeichert werden.</text:p>
      <text:p text:style-name="Text_20_body"><text:span text:style-name="Strong_20_Emphasis">D. Umfang (Scope)</text:span> 9. Liste die 3–5 wichtigsten Funktionen (Must-have). 10. Was ist explizit <text:span text:style-name="Emphasis">nicht</text:span> Teil der Anwendung (Abgrenzung)? 11. Was wäre der absolute Minimal-Stand, mit dem die Anwendung schon nützlich ist? (MVP-Definition)</text:p>
      <text:p text:style-name="P8">1 Das Programm bietet eine Funktion, dass nach der Bearbeitung von einem multiple choice Fragebogen wie bei einer Suchmaschine die Förderungen auftauchen, die in Frage kommen.</text:p>
      <text:p text:style-name="P9"><text:span text:style-name="T2">2</text:span> Merkliste Förderungen</text:p>
      <text:p text:style-name="P9"><text:soft-page-break/><text:span text:style-name="T2">3</text:span> Übersicht der gemerkten Förderungen mit Voraussetzungen, geforderte Angaben/Dateien und Deadlines.</text:p>
      <text:p text:style-name="P9"><text:span text:style-name="T2">4</text:span> Formular, dass alle notwendigen Angaben aller gespeicherten Förderungen abfragt, dass das wiederholte ausfüllen erspart. (Bei Anträgen, die nur über ein Webportal funktionieren soll ein VorbereitungsFile erstellt werden, aus dem dann kopiert werden kann)</text:p>
      <text:p text:style-name="P9"><text:span text:style-name="T2">5</text:span> Kalenderansicht mit den Deadlines der gemerkten Förderungen und Möglichkeit eigene Deadlines hinzuzufügen.</text:p>
      <text:p text:style-name="P9"><text:span text:style-name="T2">6</text:span> Möglichkeit den Status der beantragten Förderung Anzuklicken und einzusehen. (Antrag in Bearbeitung; abgeschickt; zusage erhalten; absage erhalten; muss nachgebessert werden.)</text:p>
      <text:p text:style-name="P9"><text:span text:style-name="T2">7</text:span> Checkliste mit den benötigten Angaben und Dateien bei denen der Status angeklickt werden kann (noch nicht bearbeitet; muss noch angefragt werden; angefragt, warte auf Antwort; <text:span text:style-name="T3">alle Informationen zusammen, muss bearbeitet werden; in Bearbeitung; Abgeschlossen/ready;</text:span>)</text:p>
      <text:p text:style-name="P8"/>
      <text:p text:style-name="Text_20_body"><text:span text:style-name="Strong_20_Emphasis"><text:span text:style-name="T4">E. Daten</text:span></text:span><text:span text:style-name="T4"> 12. Welche Daten werden verarbeitet/gespeichert? (z. B. Texte, Bilder, Nutzerkon</text:span>ten, Zahlen, Dateien) 13. Sind darunter sensible Daten (Personendaten, Gesundheit, Finanzen)? – relevant für rechtliche Einordnung (CH/DSG, EU/DSGVO). 14. Sollen Daten dauerhaft gespeichert werden oder nur während einer Sitzung?</text:p>
      <text:p text:style-name="P10">Es werden Daten zu der Antrag stellenden Person/Organisation (unter anderem Name und Adresse, Kontoangaben für Auszahlungen) sowie weitere Finanzdaten wie zum Beispiel ein Kostenfinanzplan also budget ung bereits beantragte Gelder oder Steuerangaben der Antrag stellenden Person erhoben. Diese Daten sollen, sowohl <text:s/>DSGVO als auch DSG konform nur lokal auf dem Gerät gespeichert werden. Keine dieser Daten sollen das Gerät über eine Internetverbindung verlassen. Sie werden nur lokal abgefragt und dann in das endgültige Antragsfile (beziehungsweise bei reinen Web Anträgen ins Vorbereitungsfile) eingefügt.</text:p>
      <text:p text:style-name="Text_20_body"><text:span text:style-name="Strong_20_Emphasis">F. Vibecoding-Rahmen</text:span> 15. Mit welchem Werkzeug ist der Build geplant? (z. B. Claude/Cursor, Lovable, v0, Replit, Bolt, anderes) 16. Wie ist das eigene technische Vorwissen? (kein Code / Grundlagen / kann lesen aber nicht schreiben / erfahren) 17. Budget-/Kostenrahmen für Hosting, APIs, Dienste? (kostenlos zwingend / gering / egal)</text:p>
      <text:p text:style-name="Text_20_body"/>
      <text:p text:style-name="P11"><text:span text:style-name="T3">Ich mochte das Programm mit Claude bzw. Claude Code, was sich besser eignet programmieren, ich habe ein Pro Abonnement. Ein technisches Wissen ist auf ein paar Grundlagen beschränkt, aber sehr gering. Gehostet werden soll es ab besten über eine Synology NAS, die ich bereits besitze. </text:span><text:span text:style-name="T2">Alternativ habe ich bereits ein </text:span>Webhosting 1000 NUE <text:span text:style-name="T2">bei Net cup und wäre auch bereit das hochzustufen, aber nicht mehr als 10 € im Monat für den Anfang.</text:span></text:p>
      <text:p text:style-name="Text_20_body"/>
      <text:p text:style-name="Text_20_body"><text:span text:style-name="Strong_20_Emphasis">G. Anmutung</text:span> 18. Wie soll sich die Anwendung „anfühlen"? (z. B. minimalistisch, verspielt, professionell-seriös, technisch-dicht) 19. Gibt es ein bestehendes Produkt, dessen Look/UX als Referenz dient?</text:p>
      <text:p text:style-name="P12"><text:span text:style-name="T5">Der Look soll reduziert sein und zeitgenössisch. Es soll nicht aussehen, wie man sich ein altes Programm vorstellt. Als Referenz kann Trello herangezogen werd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2T12:13:05.689849100</meta:creation-date>
    <dc:date>2026-06-12T13:17:08.878033100</dc:date>
    <meta:editing-duration>PT9M2S</meta:editing-duration>
    <meta:editing-cycles>1</meta:editing-cycles>
    <meta:generator>LibreOffice/26.2.4.2$Windows_X86_64 LibreOffice_project/0229ac93fcf0d7cbc6376066c6f35021cef002dc</meta:generator>
    <meta:document-statistic meta:table-count="0" meta:image-count="0" meta:object-count="0" meta:page-count="2" meta:paragraph-count="27" meta:word-count="826" meta:character-count="6004" meta:non-whitespace-character-count="5203"/>
  </office:meta>
</office:document-meta>
</file>