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fo:font-style="italic" officeooo:rsid="000d9980" officeooo:paragraph-rsid="000d9980" style:font-style-asian="italic" style:font-style-complex="italic"/>
    </style:style>
    <style:style style:name="P3" style:family="paragraph" style:parent-style-name="Text_20_body">
      <style:text-properties fo:font-style="italic" officeooo:rsid="000d9980" officeooo:paragraph-rsid="000d9980" style:font-style-asian="italic" style:font-style-complex="italic"/>
    </style:style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text-properties fo:font-style="italic" officeooo:rsid="000d9980" officeooo:paragraph-rsid="000d9980" style:font-style-asian="italic" style:font-style-complex="italic"/>
    </style:style>
    <style:style style:name="P7" style:family="paragraph" style:parent-style-name="Heading_20_4">
      <style:text-properties fo:font-style="italic" fo:font-weight="normal" officeooo:rsid="000d9980" officeooo:paragraph-rsid="000d9980" style:font-style-asian="italic" style:font-weight-asian="normal" style:font-style-complex="italic" style:font-weight-complex="normal"/>
    </style:style>
    <style:style style:name="P8" style:family="paragraph" style:parent-style-name="Heading_20_4">
      <style:text-properties fo:font-style="italic" style:font-style-asian="italic" style:font-style-complex="italic"/>
    </style:style>
    <style:style style:name="P9" style:family="paragraph" style:parent-style-name="Text_20_body">
      <style:text-properties fo:font-style="italic" style:font-style-asian="italic" style:font-style-complex="italic"/>
    </style:style>
    <style:style style:name="P10" style:family="paragraph" style:parent-style-name="Text_20_body" style:list-style-name="L3">
      <style:paragraph-properties fo:margin-top="0cm" fo:margin-bottom="0cm" style:contextual-spacing="false"/>
    </style:style>
    <style:style style:name="P11" style:family="paragraph" style:parent-style-name="Text_20_body" style:list-style-name="L3"/>
    <style:style style:name="P12" style:family="paragraph" style:parent-style-name="Standard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Fragebogen 4 – Detail &amp; Edge Cases (Abschluss)</text:h>
      <text:p text:style-name="Text_20_body"><text:span text:style-name="Strong_20_Emphasis">V. Aktualisierung (Nachfass zu T)</text:span></text:p>
      <text:list text:style-name="L1">
        <text:list-item>
          <text:p text:style-name="P1">Soll die halb-automatische Aktualisierung <text:span text:style-name="Strong_20_Emphasis">manuell per Knopfdruck</text:span> oder <text:span text:style-name="Strong_20_Emphasis">automatisch zeitgesteuert</text:span> (z. B. wöchentlich) ausgelöst werden? (Betrifft nur die spätere Ausbaustufe.) </text:p>
          <text:p text:style-name="P2">Automatisch wöchentlich</text:p>
        </text:list-item>
      </text:list>
      <text:p text:style-name="Text_20_body"><text:span text:style-name="Strong_20_Emphasis">W. Zugriffs-Sicherheit der Sync-Ebene</text:span> 2. Option A (direkte Internet-Exposition + HTTPS + Login) oder Option B (VPN)? (siehe Punkt 1)</text:p>
      <text:p text:style-name="Text_20_body"><text:span text:style-name="T1">HTTPS + mTLS (Client-Zertifikat)</text:span></text:p>
      <text:p text:style-name="Text_20_body"><text:span text:style-name="Strong_20_Emphasis">X. Antworten-File-Design</text:span> 3. Ein gemeinsames File (einfacher, fehleranfällig) oder getrennte Maschine-/Mensch-Dateien (robuster)? (siehe Punkt 2)</text:p>
      <text:p text:style-name="P3">getrennte Dateien, mit der Option Veränderungen und Anpassungen in das maschinenlesbare herüber zu synchronisieren</text:p>
      <text:p text:style-name="Text_20_body"><text:span text:style-name="Strong_20_Emphasis">Y. Matching: harte vs. weiche Kriterien</text:span> 4. Welche der Kriterien sind <text:span text:style-name="Strong_20_Emphasis">harte Ausschlüsse</text:span> (passt nicht → unter „weitere Vorschläge"), welche nur <text:span text:style-name="Strong_20_Emphasis">Rang-Faktoren</text:span>? Vorschlag zur Bestätigung:</text:p>
      <text:list text:style-name="L2">
        <text:list-item>
          <text:p text:style-name="P4"><text:span text:style-name="Emphasis">hart:</text:span> Wohnsitz-Anforderung, Durchführungsort, Trägerschaft (studentisch ja/nein) </text:p>
        </text:list-item>
        <text:list-item>
          <text:p text:style-name="P5"><text:span text:style-name="Emphasis">weich:</text:span> Sparte, Projektart, Budgetgrösse, Zeitpunkt Passt diese Zuordnung? </text:p>
          <text:p text:style-name="P6">Ja passt, muss vielleicht später angepasst werden</text:p>
        </text:list-item>
      </text:list>
      <text:p text:style-name="Text_20_body"><text:span text:style-name="Strong_20_Emphasis">Z. Lokale Verschlüsselung – Edge Case</text:span> 5. Wenn das lokale Passwort verloren geht, sind die verschlüsselten Daten <text:span text:style-name="Strong_20_Emphasis">per Design nicht wiederherstellbar</text:span>. Wird das akzeptiert (maximale Sicherheit), oder ist ein Wiederherstellungs-Mechanismus gewünscht (schwächt die Sicherheit)?</text:p>
      <text:p text:style-name="P3">Ja nicht mehr wiederherstellbar, dann müssen die Daten neu eingegeben werden. Dafür eine Funktion einbauen.</text:p>
      <text:p text:style-name="Text_20_body"><text:span text:style-name="Strong_20_Emphasis">AA. Desktop-Technik</text:span> 6. Für eine plattformübergreifende installierbare App (Windows zuerst, später macOS/Linux) empfiehlt das System den <text:span text:style-name="Strong_20_Emphasis">Electron</text:span>-Ansatz (gut dokumentiert, einsteiger-tauglich mit Claude Code, deckt alle drei Systeme ab). Alternative wäre <text:span text:style-name="Emphasis">Tauri</text:span> (schlanker/sicherer, aber technisch anspruchsvoller). Tendenz – Electron akzeptiert oder Tauri bevorzugt?</text:p>
      <text:h text:style-name="P7" text:outline-level="4">Tauri unter einbezug von folgenden Empfehlungen:</text:h>
      <text:h text:style-name="P8" text:outline-level="4">Empfehlung zur Risiko-Minimierung</text:h>
      <text:p text:style-name="P9">Falls Tauri gewählt wird, reduziert folgendes Vorgehen das „Stecken-bleiben"-Risiko:</text:p>
      <text:list text:style-name="L3">
        <text:list-item>
          <text:p text:style-name="P10"><text:span text:style-name="Strong_20_Emphasis"><text:span text:style-name="T1">Rust-Oberfläche klein halten:</text:span></text:span><text:span text:style-name="T1"> so viel Logik wie möglich im JS-Frontend belassen, nur echte OS-Operationen (Datei, Krypto, mTLS) ins Rust-Backend auslagern. </text:span></text:p>
        </text:list-item>
        <text:list-item>
          <text:p text:style-name="P10"><text:span text:style-name="Strong_20_Emphasis"><text:span text:style-name="T1">Claude Code gezielt als Erklär-Instanz nutzen:</text:span></text:span><text:span text:style-name="T1"> bei jedem Rust-Befehl nicht nur den Code, sondern das </text:span><text:span text:style-name="Emphasis"><text:span text:style-name="T1">Warum</text:span></text:span><text:span text:style-name="T1"> anfordern – so wächst das Verständnis mit dem Projekt. </text:span></text:p>
        </text:list-item>
        <text:list-item>
          <text:p text:style-name="P11"><text:span text:style-name="Strong_20_Emphasis"><text:span text:style-name="T1">Toolchain zuerst, Funktion zweitens:</text:span></text:span><text:span text:style-name="T1"> als allererstes ein leeres „Hallo-Welt"-Tauri-Projekt zum Laufen bringen und sauber bauen, bevor Funktionen entstehen. Das trennt Bau-Probleme von Logik-Problemen.</text:span></text:p>
        </text:list-item>
      </text:list>
      <text:p text:style-name="P9"/>
      <text:p text:style-name="Text_20_body"><text:soft-page-break/><text:span text:style-name="Strong_20_Emphasis">AB. Konto-Vorbereitung</text:span> 7. Für das spätere Abo-/Verifizierungs-Modell: Soll die Sync-Ebene bereits jetzt mit einem <text:span text:style-name="Strong_20_Emphasis">Nutzerkonto-Konzept</text:span> gebaut werden (MVP nutzt ein gemeinsames Team-Passwort, aber die Struktur ist vorbereitet)? – ja / nein</text:p>
      <text:p text:style-name="P3">Ja bereits jetzt mit einem Nutzerkonto Konzept bauen.</text:p>
      <text:p text:style-name="Text_20_body"><text:span text:style-name="Strong_20_Emphasis">AC. Daten-Wiederverwendung</text:span> 8. Die Wiederverwendung von Daten aus früheren Anträgen: Soll dies projektübergreifend funktionieren (ein zentraler Stammdaten-Speicher, aus dem jedes neue Projekt schöpft)? – ja / nein</text:p>
      <text:p text:style-name="P3">Ja, soll auch Projekt übergreifend funktionieren</text:p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2T14:23:37.736948800</meta:creation-date>
    <dc:date>2026-06-12T14:33:17.632916200</dc:date>
    <meta:editing-duration>PT9M40S</meta:editing-duration>
    <meta:editing-cycles>1</meta:editing-cycles>
    <meta:document-statistic meta:table-count="0" meta:image-count="0" meta:object-count="0" meta:page-count="2" meta:paragraph-count="25" meta:word-count="384" meta:character-count="3072" meta:non-whitespace-character-count="2709"/>
    <meta:generator>LibreOffice/26.2.4.2$Windows_X86_64 LibreOffice_project/0229ac93fcf0d7cbc6376066c6f35021cef002dc</meta:generator>
  </office:meta>
</office:document-meta>
</file>